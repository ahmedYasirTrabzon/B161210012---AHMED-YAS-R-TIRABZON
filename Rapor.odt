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5334"/>
    </style:style>
    <style:style style:name="P2" style:family="paragraph" style:parent-style-name="Standard">
      <style:paragraph-properties fo:text-align="center" style:justify-single-word="false"/>
      <style:text-properties style:font-name="Poppins" fo:font-size="22pt" fo:font-weight="bold" officeooo:paragraph-rsid="000a5334" style:font-size-asian="22pt" style:font-weight-asian="bold" style:font-name-complex="Poppins1" style:font-size-complex="22pt" style:font-weight-complex="bold"/>
    </style:style>
    <style:style style:name="P3" style:family="paragraph" style:parent-style-name="Standard">
      <style:text-properties officeooo:paragraph-rsid="000a5334"/>
    </style:style>
    <style:style style:name="P4" style:family="paragraph" style:parent-style-name="Standard">
      <style:text-properties style:font-name="Poppins" fo:font-size="10pt" fo:font-weight="bold" officeooo:paragraph-rsid="000a5334" fo:background-color="#ffffff" style:font-size-asian="10pt" style:font-weight-asian="bold" style:font-name-complex="Poppins1" style:font-size-complex="10pt" style:font-weight-complex="bold"/>
    </style:style>
    <style:style style:name="T1" style:family="text">
      <style:text-properties style:font-name="Poppins" fo:font-size="22pt" fo:font-weight="bold" fo:background-color="#ffffff" loext:char-shading-value="0" style:font-size-asian="22pt" style:font-weight-asian="bold" style:font-name-complex="Poppins1" style:font-size-complex="22pt" style:font-weight-complex="bold"/>
    </style:style>
    <style:style style:name="T2" style:family="text">
      <style:text-properties style:font-name="Poppins" fo:font-size="22pt" fo:font-weight="bold" style:font-size-asian="22pt" style:font-weight-asian="bold" style:font-name-complex="Poppins1" style:font-size-complex="22pt" style:font-weight-complex="bold"/>
    </style:style>
    <style:style style:name="T3" style:family="text">
      <style:text-properties style:font-name="Poppins" fo:font-weight="bold" style:font-weight-asian="bold" style:font-name-complex="Poppins1" style:font-weight-complex="bold"/>
    </style:style>
    <style:style style:name="T4" style:family="text">
      <style:text-properties style:font-name="Poppins" fo:font-weight="bold" officeooo:rsid="000a5334" style:font-weight-asian="bold" style:font-name-complex="Poppins1" style:font-weight-complex="bold"/>
    </style:style>
    <style:style style:name="T5" style:family="text">
      <style:text-properties style:font-name="Poppins" fo:font-size="10pt" fo:font-weight="bold" fo:background-color="#ffffff" loext:char-shading-value="0" style:font-size-asian="10pt" style:font-weight-asian="bold" style:font-name-complex="Poppins1" style:font-size-complex="10pt" style:font-weight-complex="bold"/>
    </style:style>
    <style:style style:name="T6" style:family="text">
      <style:text-properties fo:color="#b5b5c3" loext:opacity="100%" style:font-name="Poppins" fo:font-size="10pt" fo:background-color="#ffffff" loext:char-shading-value="0" style:font-size-asian="10pt" style:font-name-complex="Poppin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WEB TEKNOLOJİLERİ</text:span></text:p>
      <text:p text:style-name="P1" loext:marker-style-name="T2"><text:span text:style-name="T2">PROJE <text:s/>RAPORU</text:span></text:p>
      <text:p text:style-name="P2" loext:marker-style-name="T2"/>
      <text:p text:style-name="P3" loext:marker-style-name="T3"><text:span text:style-name="T3">ÖĞRENCİ ADI VE SOYADI: </text:span><text:span text:style-name="T4">Ahmed Yasir Tırabzon</text:span></text:p>
      <text:p text:style-name="P3" loext:marker-style-name="T3"><text:span text:style-name="T3">ÖĞRENCİ NUMARASI: </text:span><text:span text:style-name="T4">B161210012</text:span></text:p>
      <text:p text:style-name="P3" loext:marker-style-name="T3"><text:span text:style-name="T3">ŞUBE: </text:span><text:span text:style-name="T4">1-A</text:span></text:p>
      <text:p text:style-name="P3" loext:marker-style-name="T5"><text:span text:style-name="T3">DERSİ VEREN ÖĞRETİM ÜYESİ:</text:span><text:span text:style-name="T6"> </text:span><text:span text:style-name="T5">Dr.Öğr.Üyesi HÜSEYİN ESKİ</text:span></text:p>
      <text:p text:style-name="P3" loext:marker-style-name="T5"><text:span text:style-name="T5">GITHUB LINK:</text:span> <text:span text:style-name="Internet_20_link"><text:span text:style-name="T5">https://github.com/ahmedYasirTrabzon/B161210012---AHMED-YAS-R-TIRABZON</text:span></text:span></text:p>
      <text:p text:style-name="P3" loext:marker-style-name="T5"><text:span text:style-name="T5">PROJENİN HOST EDİLDİĞİ LİNK:</text:span> <text:a xlink:type="simple" xlink:href="https://161210012webproje.lovestoblog.com/index.html" text:style-name="Internet_20_link" text:visited-style-name="Visited_20_Internet_20_Link"><text:span text:style-name="T5">https://161210012webproje.lovestoblog.com/index.html</text:span></text:a></text:p>
      <text:p text:style-name="P4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5T23:01:40.010854900</meta:creation-date>
    <dc:date>2026-05-17T18:22:50.004148400</dc:date>
    <meta:editing-duration>PT18H32M19S</meta:editing-duration>
    <meta:editing-cycles>2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8" meta:word-count="32" meta:character-count="326" meta:non-whitespace-character-count="302"/>
  </office:meta>
</office:document-meta>
</file>